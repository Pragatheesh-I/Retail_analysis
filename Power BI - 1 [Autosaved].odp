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19105b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1d1c1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19105b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1d1c1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19105b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1d1c1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19105b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2867a4" draw:opacity="100%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1d1c1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19105b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1d1c1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1d1c1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19105b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1d1c1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19105b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9" draw:stroke="none" draw:auto-grow-width="false" draw:auto-grow-height="false"/>
      <style:paragraph-properties style:font-independent-line-spacing="true" style:writing-mode="lr-tb"/>
    </style:style>
    <style:style style:family="graphic" style:name="a361" style:parent-style-name="Graphics">
      <style:graphic-properties draw:fill="none" draw:stroke="none"/>
    </style:style>
    <style:style style:family="text" style:name="a362">
      <style:text-properties fo:font-variant="normal" fo:text-transform="none" fo:color="#130b47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130b47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0in" svg:y="0in" svg:width="13.33333in" svg:height="0.81in" draw:id="id63" draw:style-name="a360" draw:name="Rectangle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1" draw:name="Picture 10" svg:x="11.60502in" svg:y="0.08861in" svg:width="1.99199in" svg:height="0.81069in" style:rel-width="scale" style:rel-height="scale">
          <draw:image xlink:href="media/image1.png" xlink:type="simple" xlink:show="embed" xlink:actuate="onLoad"/>
          <svg:title/>
          <svg:desc/>
        </draw:frame>
        <draw:frame draw:id="id65" draw:style-name="a365" draw:name="TextBox 13" svg:x="11.86869in" svg:y="0.08861in" svg:width="1.46465in" svg:height="0.27769in">
          <draw:text-box>
            <text:p text:style-name="a364" text:class-names="" text:cond-style-name=""><text:span text:style-name="a362" text:class-names="">Powered by</text:span><text:span text:style-name="a363" text:class-names=""/></text:p>
          </draw:text-box>
          <svg:title/>
          <svg:desc/>
        </draw:frame>
        <draw:frame draw:id="id66" draw:style-name="a371" draw:name="TextBox 14" svg:x="0.69791in" svg:y="0.14104in" svg:width="1.91778in" svg:height="0.40391in">
          <draw:text-box>
            <text:p text:style-name="a370" text:class-names="" text:cond-style-name=""><text:span text:style-name="a366" text:class-names="">RETAIL</text:span><text:span text:style-name="a367" text:class-names=""><text:s text:c="1"/></text:span><text:span text:style-name="a368" text:class-names="">STORE<text:s text:c="1"/></text:span><text:span text:style-name="a369" text:class-names=""/></text:p>
          </draw:text-box>
          <svg:title/>
          <svg:desc/>
        </draw:frame>
        <draw:g draw:name="Group 288" draw:id="id67">
          <svg:title/>
          <svg:desc/>
          <draw:custom-shape svg:x="0.1165in" svg:y="0.13048in" svg:width="0.20835in" svg:height="0.35898in" draw:id="id69" draw:style-name="a377" draw:name="Line 289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83306in" svg:y="0.48665in" svg:width="0.1084in" svg:height="0.18442in" draw:id="id70" draw:style-name="a380" draw:name="Line 290">
            <svg:title/>
            <svg:desc/>
            <text:p text:style-name="a379" text:class-names="" text:cond-style-name=""><text:span text:style-name="a37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57825in" svg:y="0.09247in" svg:width="0.05631in" svg:height="0.09714in" draw:id="id71" draw:style-name="a383" draw:name="Line 291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24461in" svg:y="0.56267in" svg:width="0.55889in" svg:height="0.15486in" draw:id="id72" draw:style-name="a386" draw:name="Freeform 292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type="non-primitive" svg:viewBox="0 0 397 110" draw:enhanced-path="M ?f0 ?f3 L ?f4 ?f5 ?f6 ?f7 ?f1 ?f8 ?f9 ?f0 ?f1 ?f8 ?f10 ?f2 N" draw:text-areas="?f39 ?f41 ?f40 ?f42" draw:glue-points="?f43 ?f44 ?f45 ?f46 ?f47 ?f48 ?f49 ?f50 ?f51 ?f52 ?f49 ?f50 ?f53 ?f54" draw:glue-point-leaving-directions="-90, -90, -90, -90, -90, -90, -90">
              <draw:equation draw:name="f0" draw:formula="0"/>
              <draw:equation draw:name="f1" draw:formula="397"/>
              <draw:equation draw:name="f2" draw:formula="110"/>
              <draw:equation draw:name="f3" draw:formula="48"/>
              <draw:equation draw:name="f4" draw:formula="142"/>
              <draw:equation draw:name="f5" draw:formula="10"/>
              <draw:equation draw:name="f6" draw:formula="163"/>
              <draw:equation draw:name="f7" draw:formula="102"/>
              <draw:equation draw:name="f8" draw:formula="41"/>
              <draw:equation draw:name="f9" draw:formula="324"/>
              <draw:equation draw:name="f10" draw:formula="356"/>
              <draw:equation draw:name="f11" draw:formula="?f2 - ?f0"/>
              <draw:equation draw:name="f12" draw:formula="?f1 - ?f0"/>
              <draw:equation draw:name="f13" draw:formula="?f12 / 397"/>
              <draw:equation draw:name="f14" draw:formula="?f11 / 110"/>
              <draw:equation draw:name="f15" draw:formula="0 * ?f12"/>
              <draw:equation draw:name="f16" draw:formula="48 * ?f11"/>
              <draw:equation draw:name="f17" draw:formula="142 * ?f12"/>
              <draw:equation draw:name="f18" draw:formula="10 * ?f11"/>
              <draw:equation draw:name="f19" draw:formula="163 * ?f12"/>
              <draw:equation draw:name="f20" draw:formula="102 * ?f11"/>
              <draw:equation draw:name="f21" draw:formula="397 * ?f12"/>
              <draw:equation draw:name="f22" draw:formula="41 * ?f11"/>
              <draw:equation draw:name="f23" draw:formula="324 * ?f12"/>
              <draw:equation draw:name="f24" draw:formula="0 * ?f11"/>
              <draw:equation draw:name="f25" draw:formula="356 * ?f12"/>
              <draw:equation draw:name="f26" draw:formula="110 * ?f11"/>
              <draw:equation draw:name="f27" draw:formula="?f15 / 397"/>
              <draw:equation draw:name="f28" draw:formula="?f16 / 110"/>
              <draw:equation draw:name="f29" draw:formula="?f17 / 397"/>
              <draw:equation draw:name="f30" draw:formula="?f18 / 110"/>
              <draw:equation draw:name="f31" draw:formula="?f19 / 397"/>
              <draw:equation draw:name="f32" draw:formula="?f20 / 110"/>
              <draw:equation draw:name="f33" draw:formula="?f21 / 397"/>
              <draw:equation draw:name="f34" draw:formula="?f22 / 110"/>
              <draw:equation draw:name="f35" draw:formula="?f23 / 397"/>
              <draw:equation draw:name="f36" draw:formula="?f24 / 110"/>
              <draw:equation draw:name="f37" draw:formula="?f25 / 397"/>
              <draw:equation draw:name="f38" draw:formula="?f26 / 110"/>
              <draw:equation draw:name="f39" draw:formula="0 / ?f13"/>
              <draw:equation draw:name="f40" draw:formula="?f1 / ?f13"/>
              <draw:equation draw:name="f41" draw:formula="0 / ?f14"/>
              <draw:equation draw:name="f42" draw:formula="?f2 / ?f14"/>
              <draw:equation draw:name="f43" draw:formula="?f27 / ?f13"/>
              <draw:equation draw:name="f44" draw:formula="?f28 / ?f14"/>
              <draw:equation draw:name="f45" draw:formula="?f29 / ?f13"/>
              <draw:equation draw:name="f46" draw:formula="?f30 / ?f14"/>
              <draw:equation draw:name="f47" draw:formula="?f31 / ?f13"/>
              <draw:equation draw:name="f48" draw:formula="?f32 / ?f14"/>
              <draw:equation draw:name="f49" draw:formula="?f33 / ?f13"/>
              <draw:equation draw:name="f50" draw:formula="?f34 / ?f14"/>
              <draw:equation draw:name="f51" draw:formula="?f35 / ?f13"/>
              <draw:equation draw:name="f52" draw:formula="?f36 / ?f14"/>
              <draw:equation draw:name="f53" draw:formula="?f37 / ?f13"/>
              <draw:equation draw:name="f54" draw:formula="?f38 / ?f14"/>
            </draw:enhanced-geometry>
          </draw:custom-shape>
          <draw:custom-shape svg:x="0.31218in" svg:y="0.19524in" svg:width="0.42656in" svg:height="0.41107in" draw:id="id73" draw:style-name="a389" draw:name="Freeform 293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type="non-primitive" svg:viewBox="0 0 157 151" draw:enhanced-path="M ?f3 ?f4 C ?f5 ?f6 ?f0 ?f7 ?f8 ?f9 ?f10 ?f11 ?f7 ?f0 ?f12 ?f3 ?f13 ?f14 ?f1 ?f15 ?f16 ?f17 ?f18 ?f19 ?f20 ?f21 ?f22 ?f2 N" draw:text-areas="?f47 ?f49 ?f48 ?f50" draw:glue-points="?f51 ?f52 ?f53 ?f54 ?f55 ?f56 ?f57 ?f58 ?f59 ?f60" draw:glue-point-leaving-directions="-90, -90, -90, -90, -90">
              <draw:equation draw:name="f0" draw:formula="0"/>
              <draw:equation draw:name="f1" draw:formula="157"/>
              <draw:equation draw:name="f2" draw:formula="151"/>
              <draw:equation draw:name="f3" draw:formula="18"/>
              <draw:equation draw:name="f4" draw:formula="122"/>
              <draw:equation draw:name="f5" draw:formula="3"/>
              <draw:equation draw:name="f6" draw:formula="101"/>
              <draw:equation draw:name="f7" draw:formula="73"/>
              <draw:equation draw:name="f8" draw:formula="12"/>
              <draw:equation draw:name="f9" draw:formula="48"/>
              <draw:equation draw:name="f10" draw:formula="30"/>
              <draw:equation draw:name="f11" draw:formula="13"/>
              <draw:equation draw:name="f12" draw:formula="108"/>
              <draw:equation draw:name="f13" draw:formula="143"/>
              <draw:equation draw:name="f14" draw:formula="35"/>
              <draw:equation draw:name="f15" draw:formula="78"/>
              <draw:equation draw:name="f16" draw:formula="139"/>
              <draw:equation draw:name="f17" draw:formula="113"/>
              <draw:equation draw:name="f18" draw:formula="128"/>
              <draw:equation draw:name="f19" draw:formula="134"/>
              <draw:equation draw:name="f20" draw:formula="109"/>
              <draw:equation draw:name="f21" draw:formula="147"/>
              <draw:equation draw:name="f22" draw:formula="87"/>
              <draw:equation draw:name="f23" draw:formula="?f2 - ?f0"/>
              <draw:equation draw:name="f24" draw:formula="?f1 - ?f0"/>
              <draw:equation draw:name="f25" draw:formula="?f24 / 157"/>
              <draw:equation draw:name="f26" draw:formula="?f23 / 151"/>
              <draw:equation draw:name="f27" draw:formula="18 * ?f24"/>
              <draw:equation draw:name="f28" draw:formula="122 * ?f23"/>
              <draw:equation draw:name="f29" draw:formula="12 * ?f24"/>
              <draw:equation draw:name="f30" draw:formula="48 * ?f23"/>
              <draw:equation draw:name="f31" draw:formula="108 * ?f24"/>
              <draw:equation draw:name="f32" draw:formula="18 * ?f23"/>
              <draw:equation draw:name="f33" draw:formula="139 * ?f24"/>
              <draw:equation draw:name="f34" draw:formula="113 * ?f23"/>
              <draw:equation draw:name="f35" draw:formula="87 * ?f24"/>
              <draw:equation draw:name="f36" draw:formula="151 * ?f23"/>
              <draw:equation draw:name="f37" draw:formula="?f27 / 157"/>
              <draw:equation draw:name="f38" draw:formula="?f28 / 151"/>
              <draw:equation draw:name="f39" draw:formula="?f29 / 157"/>
              <draw:equation draw:name="f40" draw:formula="?f30 / 151"/>
              <draw:equation draw:name="f41" draw:formula="?f31 / 157"/>
              <draw:equation draw:name="f42" draw:formula="?f32 / 151"/>
              <draw:equation draw:name="f43" draw:formula="?f33 / 157"/>
              <draw:equation draw:name="f44" draw:formula="?f34 / 151"/>
              <draw:equation draw:name="f45" draw:formula="?f35 / 157"/>
              <draw:equation draw:name="f46" draw:formula="?f36 / 151"/>
              <draw:equation draw:name="f47" draw:formula="0 / ?f25"/>
              <draw:equation draw:name="f48" draw:formula="?f1 / ?f25"/>
              <draw:equation draw:name="f49" draw:formula="0 / ?f26"/>
              <draw:equation draw:name="f50" draw:formula="?f2 / ?f26"/>
              <draw:equation draw:name="f51" draw:formula="?f37 / ?f25"/>
              <draw:equation draw:name="f52" draw:formula="?f38 / ?f26"/>
              <draw:equation draw:name="f53" draw:formula="?f39 / ?f25"/>
              <draw:equation draw:name="f54" draw:formula="?f40 / ?f26"/>
              <draw:equation draw:name="f55" draw:formula="?f41 / ?f25"/>
              <draw:equation draw:name="f56" draw:formula="?f42 / ?f26"/>
              <draw:equation draw:name="f57" draw:formula="?f43 / ?f25"/>
              <draw:equation draw:name="f58" draw:formula="?f44 / ?f26"/>
              <draw:equation draw:name="f59" draw:formula="?f45 / ?f25"/>
              <draw:equation draw:name="f60" draw:formula="?f46 / ?f26"/>
            </draw:enhanced-geometry>
          </draw:custom-shape>
          <draw:custom-shape svg:x="0.43184in" svg:y="0.32617in" svg:width="0.15908in" svg:height="0.17879in" draw:id="id74" draw:style-name="a392" draw:name="Freeform 294">
            <svg:title/>
            <svg:desc/>
            <text:p text:style-name="a391" text:class-names="" text:cond-style-name=""><text:span text:style-name="a390" text:class-names=""/></text:p>
            <draw:enhanced-geometry xmlns:dr3d="urn:oasis:names:tc:opendocument:xmlns:dr3d:1.0" draw:type="non-primitive" svg:viewBox="0 0 59 66" draw:enhanced-path="M ?f3 ?f4 C ?f3 ?f4 ?f1 ?f5 ?f6 ?f7 ?f8 ?f0 ?f9 ?f10 ?f11 ?f11 ?f12 ?f13 ?f14 ?f15 ?f0 ?f16 ?f0 ?f16 ?f17 ?f16 ?f18 ?f19 ?f20 ?f2 ?f21 ?f2 ?f22 ?f2 N" draw:text-areas="?f51 ?f53 ?f52 ?f54" draw:glue-points="?f55 ?f56 ?f57 ?f58 ?f59 ?f60 ?f61 ?f62 ?f63 ?f64 ?f65 ?f66" draw:glue-point-leaving-directions="-90, -90, -90, -90, -90, -90">
              <draw:equation draw:name="f0" draw:formula="0"/>
              <draw:equation draw:name="f1" draw:formula="59"/>
              <draw:equation draw:name="f2" draw:formula="66"/>
              <draw:equation draw:name="f3" draw:formula="53"/>
              <draw:equation draw:name="f4" draw:formula="27"/>
              <draw:equation draw:name="f5" draw:formula="14"/>
              <draw:equation draw:name="f6" draw:formula="45"/>
              <draw:equation draw:name="f7" draw:formula="7"/>
              <draw:equation draw:name="f8" draw:formula="31"/>
              <draw:equation draw:name="f9" draw:formula="25"/>
              <draw:equation draw:name="f10" draw:formula="17"/>
              <draw:equation draw:name="f11" draw:formula="23"/>
              <draw:equation draw:name="f12" draw:formula="22"/>
              <draw:equation draw:name="f13" draw:formula="30"/>
              <draw:equation draw:name="f14" draw:formula="18"/>
              <draw:equation draw:name="f15" draw:formula="42"/>
              <draw:equation draw:name="f16" draw:formula="47"/>
              <draw:equation draw:name="f17" draw:formula="9"/>
              <draw:equation draw:name="f18" draw:formula="19"/>
              <draw:equation draw:name="f19" draw:formula="57"/>
              <draw:equation draw:name="f20" draw:formula="28"/>
              <draw:equation draw:name="f21" draw:formula="36"/>
              <draw:equation draw:name="f22" draw:formula="39"/>
              <draw:equation draw:name="f23" draw:formula="?f2 - ?f0"/>
              <draw:equation draw:name="f24" draw:formula="?f1 - ?f0"/>
              <draw:equation draw:name="f25" draw:formula="?f24 / 59"/>
              <draw:equation draw:name="f26" draw:formula="?f23 / 66"/>
              <draw:equation draw:name="f27" draw:formula="53 * ?f24"/>
              <draw:equation draw:name="f28" draw:formula="27 * ?f23"/>
              <draw:equation draw:name="f29" draw:formula="45 * ?f24"/>
              <draw:equation draw:name="f30" draw:formula="7 * ?f23"/>
              <draw:equation draw:name="f31" draw:formula="23 * ?f24"/>
              <draw:equation draw:name="f32" draw:formula="23 * ?f23"/>
              <draw:equation draw:name="f33" draw:formula="0 * ?f24"/>
              <draw:equation draw:name="f34" draw:formula="47 * ?f23"/>
              <draw:equation draw:name="f35" draw:formula="19 * ?f24"/>
              <draw:equation draw:name="f36" draw:formula="57 * ?f23"/>
              <draw:equation draw:name="f37" draw:formula="39 * ?f24"/>
              <draw:equation draw:name="f38" draw:formula="66 * ?f23"/>
              <draw:equation draw:name="f39" draw:formula="?f27 / 59"/>
              <draw:equation draw:name="f40" draw:formula="?f28 / 66"/>
              <draw:equation draw:name="f41" draw:formula="?f29 / 59"/>
              <draw:equation draw:name="f42" draw:formula="?f30 / 66"/>
              <draw:equation draw:name="f43" draw:formula="?f31 / 59"/>
              <draw:equation draw:name="f44" draw:formula="?f32 / 66"/>
              <draw:equation draw:name="f45" draw:formula="?f33 / 59"/>
              <draw:equation draw:name="f46" draw:formula="?f34 / 66"/>
              <draw:equation draw:name="f47" draw:formula="?f35 / 59"/>
              <draw:equation draw:name="f48" draw:formula="?f36 / 66"/>
              <draw:equation draw:name="f49" draw:formula="?f37 / 59"/>
              <draw:equation draw:name="f50" draw:formula="?f38 / 66"/>
              <draw:equation draw:name="f51" draw:formula="0 / ?f25"/>
              <draw:equation draw:name="f52" draw:formula="?f1 / ?f25"/>
              <draw:equation draw:name="f53" draw:formula="0 / ?f26"/>
              <draw:equation draw:name="f54" draw:formula="?f2 / ?f26"/>
              <draw:equation draw:name="f55" draw:formula="?f39 / ?f25"/>
              <draw:equation draw:name="f56" draw:formula="?f40 / ?f26"/>
              <draw:equation draw:name="f57" draw:formula="?f41 / ?f25"/>
              <draw:equation draw:name="f58" draw:formula="?f42 / ?f26"/>
              <draw:equation draw:name="f59" draw:formula="?f43 / ?f25"/>
              <draw:equation draw:name="f60" draw:formula="?f44 / ?f26"/>
              <draw:equation draw:name="f61" draw:formula="?f45 / ?f25"/>
              <draw:equation draw:name="f62" draw:formula="?f46 / ?f26"/>
              <draw:equation draw:name="f63" draw:formula="?f47 / ?f25"/>
              <draw:equation draw:name="f64" draw:formula="?f48 / ?f26"/>
              <draw:equation draw:name="f65" draw:formula="?f49 / ?f25"/>
              <draw:equation draw:name="f66" draw:formula="?f50 / ?f26"/>
            </draw:enhanced-geometry>
          </draw:custom-shape>
          <draw:custom-shape svg:x="0.46985in" svg:y="0.3867in" svg:width="0.08024in" svg:height="0.04786in" draw:id="id75" draw:style-name="a395" draw:name="Line 295">
            <svg:title/>
            <svg:desc/>
            <text:p text:style-name="a394" text:class-names="" text:cond-style-name=""><text:span text:style-name="a39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custom-shape svg:x="0in" svg:y="0.81in" svg:width="1.99199in" svg:height="6.72476in" draw:id="id68" draw:style-name="a374" draw:name="Rectangle 14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59" draw:style="linear" draw:angle="900" draw:start-color="#215f9a" draw:end-color="#4e95d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-05-2026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-05-2026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-05-2026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-05-2026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-05-2026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-05-2026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-05-2026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-05-2026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-05-2026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-05-2026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-05-2026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-05-2026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ragatheesh Indiran</meta:initial-creator>
    <dc:creator>Pragatheesh Indiran</dc:creator>
    <meta:creation-date>2026-05-05T05:13:50Z</meta:creation-date>
    <dc:date>2026-05-11T12:45:41Z</dc:date>
    <meta:template xlink:href="Office%20Theme" xlink:type="simple"/>
    <meta:editing-cycles>3</meta:editing-cycles>
    <meta:editing-duration>PT5169S</meta:editing-duration>
    <meta:document-statistic meta:paragraph-count="2" meta:word-count="4"/>
  </office:meta>
</office:document-meta>
</file>